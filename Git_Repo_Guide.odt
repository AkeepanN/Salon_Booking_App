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P10" style:parent-style-name="Normal" style:list-style-name="LFO2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2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3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4" style:family="paragraph"/>
    <style:style style:name="P22" style:parent-style-name="Normal" style:list-style-name="LFO4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4" style:family="paragraph"/>
    <style:style style:name="P25" style:parent-style-name="Normal" style:list-style-name="LFO4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Step 1: Create GitHub repo</text:p>
      <text:list text:style-name="LFO1" text:continue-numbering="true">
        <text:list-item>
          <text:p text:style-name="P2">Go to<text:s/><text:span text:style-name="T3">github.com</text:span></text:p>
        </text:list-item>
        <text:list-item>
          <text:p text:style-name="P4">Login</text:p>
        </text:list-item>
        <text:list-item>
          <text:p text:style-name="P5">Click<text:s/><text:span text:style-name="T6">+</text:span><text:s/>top-right</text:p>
        </text:list-item>
        <text:list-item>
          <text:p text:style-name="P7">Click<text:s/><text:span text:style-name="T8">New repository</text:span></text:p>
        </text:list-item>
        <text:list-item>
          <text:p text:style-name="P9">Repository name:</text:p>
        </text:list-item>
      </text:list>
      <text:p text:style-name="Normal">salon-booking-app</text:p>
      <text:list text:style-name="LFO2" text:continue-numbering="true">
        <text:list-item>
          <text:p text:style-name="P10">Keep it<text:s/><text:span text:style-name="T11">Public</text:span><text:s/>or<text:s/><text:span text:style-name="T12">Private</text:span></text:p>
        </text:list-item>
        <text:list-item>
          <text:p text:style-name="P13">Do<text:s/><text:span text:style-name="T14">NOT</text:span><text:s/>tick:</text:p>
        </text:list-item>
      </text:list>
      <text:p text:style-name="Normal">Add a README</text:p>
      <text:p text:style-name="Normal">Add .gitignore</text:p>
      <text:p text:style-name="Normal">Add license</text:p>
      <text:list text:style-name="LFO3" text:continue-numbering="true">
        <text:list-item>
          <text:p text:style-name="P15">Click<text:s/><text:span text:style-name="T16">Create repository</text:span></text:p>
        </text:list-item>
      </text:list>
      <text:p text:style-name="Normal"><draw:custom-shape svg:x="0in" svg:y="0in" svg:width="45.51042in" svg:height="0.00139in" draw:z-index="0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P17">Step 2: Open PowerShell in project folder</text:p>
      <text:p text:style-name="Normal">Run:</text:p>
      <text:p text:style-name="Normal">cd "C:\Users\BANUJAN\Documents\Codex\2026-04-27\i-want-to-build-a-full-2"</text:p>
      <text:p text:style-name="Normal">Make sure you see:</text:p>
      <text:p text:style-name="Normal">backend</text:p>
      <text:p text:style-name="Normal">frontend</text:p>
      <text:p text:style-name="Normal">Check:</text:p>
      <text:p text:style-name="Normal">dir</text:p>
      <text:p text:style-name="Normal"><draw:custom-shape svg:x="0in" svg:y="0in" svg:width="45.51042in" svg:height="0.00139in" draw:z-index="0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P18">Step 3: Create .gitignore</text:p>
      <text:p text:style-name="Normal">Run:</text:p>
      <text:p text:style-name="Normal">notepad .gitignore</text:p>
      <text:p text:style-name="Normal">Paste:</text:p>
      <text:p text:style-name="Normal">node_modules/</text:p>
      <text:soft-page-break/>
      <text:p text:style-name="Normal">.env</text:p>
      <text:p text:style-name="Normal">build/</text:p>
      <text:p text:style-name="Normal">dist/</text:p>
      <text:p text:style-name="Normal">uploads/</text:p>
      <text:p text:style-name="Normal">frontend/build/</text:p>
      <text:p text:style-name="Normal">backend/uploads/</text:p>
      <text:p text:style-name="Normal">Save and close.</text:p>
      <text:p text:style-name="Normal"><draw:custom-shape svg:x="0in" svg:y="0in" svg:width="45.51042in" svg:height="0.00139in" draw:z-index="0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P19">Step 4: Initialize Git</text:p>
      <text:p text:style-name="Normal">Run:</text:p>
      <text:p text:style-name="Normal">git init</text:p>
      <text:p text:style-name="Normal">git add .</text:p>
      <text:p text:style-name="Normal">git commit -m "Initial salon booking app"</text:p>
      <text:p text:style-name="Normal"><draw:custom-shape svg:x="0in" svg:y="0in" svg:width="45.51042in" svg:height="0.00139in" draw:z-index="0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p>
      <text:p text:style-name="P20">Step 5: Connect GitHub repo</text:p>
      <text:p text:style-name="Normal">Copy your GitHub repo URL. It looks like:</text:p>
      <text:p text:style-name="Normal">https://github.com/YOUR_USERNAME/salon-booking-app.git</text:p>
      <text:p text:style-name="Normal">Then run:</text:p>
      <text:p text:style-name="Normal">git branch -M main</text:p>
      <text:p text:style-name="Normal">git remote add origin https://github.com/YOUR_USERNAME/salon-booking-app.git</text:p>
      <text:p text:style-name="Normal">git push -u origin main</text:p>
      <text:p text:style-name="Normal">Replace YOUR_USERNAME.</text:p>
      <text:p text:style-name="Normal"><draw:custom-shape svg:x="0in" svg:y="0in" svg:width="45.51042in" svg:height="0.00139in" draw:z-index="0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Normal">When it asks login, sign in with GitHub.</text:p>
      <text:p text:style-name="Normal">You used the example URL without changing it.</text:p>
      <text:p text:style-name="Normal">This part is wrong:</text:p>
      <text:p text:style-name="Normal">https://github.com/YOUR_USERNAME/YOUR_REPO_NAME.git</text:p>
      <text:p text:style-name="Normal">You must replace it with your real GitHub repo URL.</text:p>
      <text:p text:style-name="Normal">Do this:</text:p>
      <text:p text:style-name="Normal">git remote remove origin</text:p>
      <text:p text:style-name="Normal">Then add your real repo URL, example:</text:p>
      <text:p text:style-name="Normal">git remote add origin https://github.com/yourgithubname/salon-booking-app.git</text:p>
      <text:p text:style-name="Normal">Then push:</text:p>
      <text:p text:style-name="Normal">git push -u origin main</text:p>
      <text:p text:style-name="Normal">To get the correct URL:</text:p>
      <text:list text:style-name="LFO4" text:continue-numbering="true">
        <text:list-item>
          <text:p text:style-name="P21">Open your GitHub repository.</text:p>
        </text:list-item>
        <text:list-item>
          <text:p text:style-name="P22">Click the green<text:s/><text:span text:style-name="T23">Code</text:span><text:s/>button.</text:p>
        </text:list-item>
        <text:list-item>
          <text:p text:style-name="P24">Copy the HTTPS URL.</text:p>
        </text:list-item>
        <text:list-item>
          <text:p text:style-name="P25">Use that URL in:</text:p>
        </text:list-item>
      </text:list>
      <text:p text:style-name="Normal">git remote add origin PASTE_YOUR_REAL_URL_HERE</text:p>
      <text:p text:style-name="Normal">Example:</text:p>
      <text:p text:style-name="Normal">git remote add origin https://github.com/BANUJAN/salon-booking-app.git</text:p>
      <text:p text:style-name="Normal">git push -u origin mai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ta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Latha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Latha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Latha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Latha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Latha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Latha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Latha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Latha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Latha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Latha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Latha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Latha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Latha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Latha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Latha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Latha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Latha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Latha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Latha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Latha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Latha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Latha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keepan atputharasa</meta:initial-creator>
    <dc:creator>akeepan atputharasa</dc:creator>
    <meta:creation-date>2026-05-02T09:37:00Z</meta:creation-date>
    <dc:date>2026-05-02T10:00:00Z</dc:date>
    <meta:template xlink:href="Normal" xlink:type="simple"/>
    <meta:editing-cycles>1</meta:editing-cycles>
    <meta:editing-duration>PT1380S</meta:editing-duration>
    <meta:document-statistic meta:page-count="3" meta:paragraph-count="3" meta:word-count="236" meta:character-count="1583" meta:row-count="11" meta:non-whitespace-character-count="1350"/>
  </office:meta>
</office:document-meta>
</file>