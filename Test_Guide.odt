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style:font-name="Segoe UI Emoji" style:font-name-complex="Segoe UI Emoji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No problem. We’ll rebuild test data from zero.</text:p>
      <text:p text:style-name="P2">Step 0 — make sure backend is running</text:p>
      <text:p text:style-name="P3">Terminal:</text:p>
      <text:p text:style-name="P4">cd "C:\Users\BANUJAN\Documents\Codex\2026-04-27\i-want-to-build-a-full-2\backend"</text:p>
      <text:p text:style-name="P5">npm run dev</text:p>
      <text:p text:style-name="P6">Keep it open. Must show:</text:p>
      <text:p text:style-name="P7">MongoDB connected</text:p>
      <text:p text:style-name="P8">API running on port 4000</text:p>
      <text:p text:style-name="Normal"><text:span text:style-name="T9"><draw:custom-shape svg:x="0in" svg:y="0in" svg:width="45.51042in" svg:height="0.00139in" draw:z-index="0" draw:id="id0" draw:style-name="a0" draw:name="Horizontal Line 75" text:anchor-type="as-char"><svg:title/><svg:desc/><draw:enhanced-geometry draw:type="non-primitive" svg:viewBox="0 0 21600 21600" draw:enhanced-path="M 0 0 L 21600 0 21600 21600 0 21600 Z N"/></draw:custom-shape></text:span></text:p>
      <text:p text:style-name="P10">Step 1 — create barber</text:p>
      <text:p text:style-name="P11">Postman:</text:p>
      <text:p text:style-name="P12">POST</text:p>
      <text:p text:style-name="P13">http://localhost:4000/api/auth/signup</text:p>
      <text:p text:style-name="P14">Body → raw → JSON:</text:p>
      <text:p text:style-name="P15">{</text:p>
      <text:p text:style-name="P16"><text:s text:c="2"/>"name": "Test Barber",</text:p>
      <text:p text:style-name="P17"><text:s text:c="2"/>"phone": "0770000001",</text:p>
      <text:p text:style-name="P18"><text:s text:c="2"/>"password": "123456",</text:p>
      <text:p text:style-name="P19"><text:s text:c="2"/>"role": "barber"</text:p>
      <text:p text:style-name="P20">}</text:p>
      <text:p text:style-name="P21">Copy the returned token.</text:p>
      <text:p text:style-name="Normal"><text:span text:style-name="T22"><draw:custom-shape svg:x="0in" svg:y="0in" svg:width="45.51042in" svg:height="0.00139in" draw:z-index="0" draw:id="id1" draw:style-name="a1" draw:name="Horizontal Line 76" text:anchor-type="as-char"><svg:title/><svg:desc/><draw:enhanced-geometry draw:type="non-primitive" svg:viewBox="0 0 21600 21600" draw:enhanced-path="M 0 0 L 21600 0 21600 21600 0 21600 Z N"/></draw:custom-shape></text:span></text:p>
      <text:p text:style-name="P23">Step 2 — create salon</text:p>
      <text:p text:style-name="P24">Postman:</text:p>
      <text:p text:style-name="P25">POST</text:p>
      <text:p text:style-name="P26">http://localhost:4000/api/salons</text:p>
      <text:p text:style-name="P27">Authorization tab:</text:p>
      <text:p text:style-name="P28">Type: Bearer Token</text:p>
      <text:soft-page-break/>
      <text:p text:style-name="P29">Token: paste barber token</text:p>
      <text:p text:style-name="P30">Body:</text:p>
      <text:p text:style-name="P31">{</text:p>
      <text:p text:style-name="P32"><text:s text:c="2"/>"name": "Akeepan Salon",</text:p>
      <text:p text:style-name="P33"><text:s text:c="2"/>"address": "Jaffna",</text:p>
      <text:p text:style-name="P34"><text:s text:c="2"/>"phone": "0771234567"</text:p>
      <text:p text:style-name="P35">}</text:p>
      <text:p text:style-name="P36">Copy returned salon _id.</text:p>
      <text:p text:style-name="Normal"><text:span text:style-name="T37"><draw:custom-shape svg:x="0in" svg:y="0in" svg:width="45.51042in" svg:height="0.00139in" draw:z-index="0" draw:id="id2" draw:style-name="a2" draw:name="Horizontal Line 77" text:anchor-type="as-char"><svg:title/><svg:desc/><draw:enhanced-geometry draw:type="non-primitive" svg:viewBox="0 0 21600 21600" draw:enhanced-path="M 0 0 L 21600 0 21600 21600 0 21600 Z N"/></draw:custom-shape></text:span></text:p>
      <text:p text:style-name="P38">Step 3 — create service</text:p>
      <text:p text:style-name="P39">Postman:</text:p>
      <text:p text:style-name="P40">POST</text:p>
      <text:p text:style-name="P41">http://localhost:4000/api/services</text:p>
      <text:p text:style-name="P42">Authorization: same barber token.</text:p>
      <text:p text:style-name="P43">Body:</text:p>
      <text:p text:style-name="P44">{</text:p>
      <text:p text:style-name="P45"><text:s text:c="2"/>"salon_id": "PASTE_SALON_ID",</text:p>
      <text:p text:style-name="P46"><text:s text:c="2"/>"name": "Hair Cut",</text:p>
      <text:p text:style-name="P47"><text:s text:c="2"/>"price": 1000,</text:p>
      <text:p text:style-name="P48"><text:s text:c="2"/>"duration": 30</text:p>
      <text:p text:style-name="P49">}</text:p>
      <text:p text:style-name="P50">Copy returned service _id.</text:p>
      <text:p text:style-name="Normal"><text:span text:style-name="T51"><draw:custom-shape svg:x="0in" svg:y="0in" svg:width="45.51042in" svg:height="0.00139in" draw:z-index="0" draw:id="id3" draw:style-name="a3" draw:name="Horizontal Line 78" text:anchor-type="as-char"><svg:title/><svg:desc/><draw:enhanced-geometry draw:type="non-primitive" svg:viewBox="0 0 21600 21600" draw:enhanced-path="M 0 0 L 21600 0 21600 21600 0 21600 Z N"/></draw:custom-shape></text:span></text:p>
      <text:p text:style-name="P52">Step 4 — create customer</text:p>
      <text:p text:style-name="P53">Postman:</text:p>
      <text:p text:style-name="P54">POST</text:p>
      <text:p text:style-name="P55">http://localhost:4000/api/auth/signup</text:p>
      <text:p text:style-name="P56">Body:</text:p>
      <text:p text:style-name="P57">{</text:p>
      <text:p text:style-name="P58"><text:s text:c="2"/>"name": "Test Customer",</text:p>
      <text:p text:style-name="P59"><text:s text:c="2"/>"phone": "0779999999",</text:p>
      <text:p text:style-name="P60"><text:s text:c="2"/>"password": "123456",</text:p>
      <text:p text:style-name="P61"><text:s text:c="2"/>"role": "customer"</text:p>
      <text:p text:style-name="P62">}</text:p>
      <text:p text:style-name="P63">Copy returned customer token.</text:p>
      <text:p text:style-name="Normal"><text:span text:style-name="T64"><draw:custom-shape svg:x="0in" svg:y="0in" svg:width="45.51042in" svg:height="0.00139in" draw:z-index="0" draw:id="id4" draw:style-name="a4" draw:name="Horizontal Line 79" text:anchor-type="as-char"><svg:title/><svg:desc/><draw:enhanced-geometry draw:type="non-primitive" svg:viewBox="0 0 21600 21600" draw:enhanced-path="M 0 0 L 21600 0 21600 21600 0 21600 Z N"/></draw:custom-shape></text:span></text:p>
      <text:p text:style-name="P65">Step 5 — book appointment</text:p>
      <text:p text:style-name="P66">Postman:</text:p>
      <text:p text:style-name="P67">POST</text:p>
      <text:p text:style-name="P68">http://localhost:4000/api/bookings</text:p>
      <text:p text:style-name="P69">Authorization:</text:p>
      <text:p text:style-name="P70">Type: Bearer Token</text:p>
      <text:p text:style-name="P71">Token: paste customer token</text:p>
      <text:p text:style-name="Normal"><draw:custom-shape svg:x="0in" svg:y="0in" svg:width="45.51042in" svg:height="0.00139in" draw:z-index="0" draw:id="id5" draw:style-name="a5" draw:name="Horizontal Line 9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2">🔁</text:span><text:span text:style-name="T73"><text:s/>Step 3 — Use this</text:span><text:span text:style-name="T74"><text:s/>Customer not Salon</text:span><text:span text:style-name="T75"><text:s/>token for booking</text:span></text:p>
      <text:p text:style-name="Normal">Go back to booking request:</text:p>
      <text:p text:style-name="Normal"><text:span text:style-name="T76">👉</text:span><text:s/>Authorization → Bearer Token → paste<text:s/><text:span text:style-name="T77">customer token</text:span></text:p>
      <text:p text:style-name="Normal"><draw:custom-shape svg:x="0in" svg:y="0in" svg:width="45.51042in" svg:height="0.00139in" draw:z-index="0" draw:id="id6" draw:style-name="a6" draw:name="Horizontal Line 94" text:anchor-type="as-char"><svg:title/><svg:desc/><draw:enhanced-geometry draw:type="non-primitive" svg:viewBox="0 0 21600 21600" draw:enhanced-path="M 0 0 L 21600 0 21600 21600 0 21600 Z N"/></draw:custom-shape></text:p>
      <text:p text:style-name="P78"/>
      <text:p text:style-name="P79">Body:</text:p>
      <text:p text:style-name="P80">{</text:p>
      <text:p text:style-name="P81"><text:s text:c="2"/>"salon_id": "PASTE_SALON_ID",</text:p>
      <text:p text:style-name="P82"><text:s text:c="2"/>"service_id": "PASTE_SERVICE_ID",</text:p>
      <text:p text:style-name="P83"><text:s text:c="2"/>"date": "2026-04-28",</text:p>
      <text:p text:style-name="P84"><text:s text:c="2"/>"start_time": "10:00"</text:p>
      <text:p text:style-name="P85">}</text:p>
      <text:p text:style-name="P86">Expected: booking status confirmed.</text:p>
      <text:p text:style-name="Normal"><text:span text:style-name="T87"><draw:custom-shape svg:x="0in" svg:y="0in" svg:width="45.51042in" svg:height="0.00139in" draw:z-index="0" draw:id="id7" draw:style-name="a7" draw:name="Horizontal Line 80" text:anchor-type="as-char"><svg:title/><svg:desc/><draw:enhanced-geometry draw:type="non-primitive" svg:viewBox="0 0 21600 21600" draw:enhanced-path="M 0 0 L 21600 0 21600 21600 0 21600 Z N"/></draw:custom-shape></text:span></text:p>
      <text:p text:style-name="P88">Step 6 — check availability</text:p>
      <text:p text:style-name="P89">Postman:</text:p>
      <text:p text:style-name="P90">GET</text:p>
      <text:p text:style-name="P91">http://localhost:4000/api/salons/PASTE_SALON_ID/availability?date=2026-04-28&amp;service_id=PASTE_SERVICE_ID</text:p>
      <text:p text:style-name="P92">Expected: 10:00 and 10:15 should not appear.</text:p>
      <text:p text:style-name="Normal"><text:span text:style-name="T93"><draw:custom-shape svg:x="0in" svg:y="0in" svg:width="45.51042in" svg:height="0.00139in" draw:z-index="0" draw:id="id8" draw:style-name="a8" draw:name="Horizontal Line 81" text:anchor-type="as-char"><svg:title/><svg:desc/><draw:enhanced-geometry draw:type="non-primitive" svg:viewBox="0 0 21600 21600" draw:enhanced-path="M 0 0 L 21600 0 21600 21600 0 21600 Z N"/></draw:custom-shape></text:span></text:p>
      <text:p text:style-name="P94">Step 7 — check MongoDB Compass</text:p>
      <text:p text:style-name="P95">Refresh these collections:</text:p>
      <text:p text:style-name="P96">users</text:p>
      <text:p text:style-name="P97">salons</text:p>
      <text:p text:style-name="P98">services</text:p>
      <text:p text:style-name="P99">bookings</text:p>
      <text:p text:style-name="P100">bookinglocks</text:p>
      <text:p text:style-name="P101">You should see all new record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ta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Latha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Latha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Latha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Latha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Latha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Latha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Latha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Latha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Latha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Latha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Latha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Latha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Latha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Latha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Lath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Latha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Lath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Latha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Latha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Latha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Latha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Latha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keepan atputharasa</meta:initial-creator>
    <dc:creator>akeepan atputharasa</dc:creator>
    <meta:creation-date>2026-04-27T16:10:00Z</meta:creation-date>
    <dc:date>2026-04-27T16:13:00Z</dc:date>
    <meta:template xlink:href="Normal" xlink:type="simple"/>
    <meta:editing-cycles>1</meta:editing-cycles>
    <meta:editing-duration>PT180S</meta:editing-duration>
    <meta:document-statistic meta:page-count="4" meta:paragraph-count="3" meta:word-count="290" meta:character-count="1943" meta:row-count="13" meta:non-whitespace-character-count="1656"/>
  </office:meta>
</office:document-meta>
</file>